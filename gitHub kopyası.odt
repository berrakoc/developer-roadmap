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 fo:line-height="150%"/>
      <style:text-properties style:font-name="Times" fo:font-size="48.0pt" fo:color="#000000"/>
    </style:style>
    <style:style style:name="P2" style:family="paragraph" style:parent-style-name="Standard">
      <style:text-properties style:font-name="Times" fo:font-size="18.0pt" fo:color="#000000"/>
    </style:style>
    <style:style style:name="P3" style:family="paragraph" style:parent-style-name="Standard">
      <style:paragraph-properties fo:line-height="0.6000in"/>
      <style:text-properties style:font-name="Times" fo:font-size="36.0pt" fo:color="#000000"/>
    </style:style>
    <style:style style:name="P4" style:family="paragraph" style:parent-style-name="Standard">
      <style:paragraph-properties fo:margin-left="0.5000in" fo:text-indent="-0.5000in" fo:line-height="0.4167in">
        <style:tab-stops>
          <style:tab-stop style:position="0.1528in"/>
          <style:tab-stop style:position="0.5000in"/>
        </style:tab-stops>
      </style:paragraph-properties>
      <style:text-properties style:font-name="Times" fo:font-size="20.0pt" fo:color="#000000"/>
    </style:style>
    <style:style style:name="P5" style:family="paragraph" style:parent-style-name="Standard">
      <style:paragraph-properties fo:text-align="center"/>
      <style:text-properties style:font-name="Times" fo:font-size="18.0pt" fo:color="#000000"/>
    </style:style>
    <style:style style:name="P6" style:family="paragraph" style:parent-style-name="Standard">
      <style:paragraph-properties fo:line-height="0.4167in"/>
      <style:text-properties style:font-name="Times" fo:font-size="18.0pt" fo:color="#000000"/>
    </style:style>
    <style:style style:name="P7" style:family="paragraph" style:parent-style-name="Standard">
      <style:paragraph-properties fo:line-height="0.6000in"/>
      <style:text-properties style:font-name="Times" fo:font-size="32.0pt" fo:color="#000000"/>
    </style:style>
    <style:style style:name="P8" style:family="paragraph" style:parent-style-name="Standard">
      <style:paragraph-properties fo:line-height="0.4167in"/>
      <style:text-properties style:font-name="Times" fo:font-size="20.0pt" fo:color="#000000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0.0pt" fo:color="#000000"/>
    </style:style>
    <style:style style:name="P10" style:family="paragraph" style:parent-style-name="Standard">
      <style:text-properties style:font-name="Times" fo:font-size="18.0pt" fo:color="#c00000"/>
    </style:style>
    <style:style style:name="P11" style:family="paragraph" style:parent-style-name="Standard">
      <style:text-properties style:font-name="Times" fo:font-size="18.0pt" fo:color="#4472c4"/>
    </style:style>
    <style:style style:name="T1" style:family="text">
      <style:text-properties fo:font-size="36.0pt" fo:font-size-asian="36.0pt" fo:font-size-complex="36.0pt" style:text-underline-style="solid" style:text-line-through-style="solid" fo:letter-spacing="0.0000in" fo:color="#ffffff"/>
    </style:style>
    <style:style style:name="T2" style:family="text">
      <style:text-properties fo:font-weight="bold" fo:font-weight-asian="bold" fo:font-weight-complex="bold" style:text-underline-style="solid" style:text-line-through-style="solid" fo:letter-spacing="0.0000in" fo:color="#c00000"/>
    </style:style>
    <style:style style:name="T3" style:family="text">
      <style:text-properties fo:font-weight="bold" fo:font-weight-asian="bold" fo:font-weight-complex="bold" style:text-underline-style="solid" style:text-line-through-style="solid" fo:letter-spacing="0.0000in"/>
    </style:style>
    <style:style style:name="T4" style:family="text">
      <style:text-properties style:text-underline-style="solid" style:text-line-through-style="solid" fo:letter-spacing="0.0000in"/>
    </style:style>
    <style:style style:name="T5" style:family="text">
      <style:text-properties fo:font-weight="bold" fo:font-weight-asian="bold" fo:font-weight-complex="bold" fo:color="#c00000"/>
    </style:style>
    <style:style style:name="T6" style:family="text">
      <style:text-properties style:text-underline-style="solid" style:text-line-through-style="solid" fo:letter-spacing="0.0000in" fo:color="#c00000"/>
    </style:style>
    <style:style style:name="T7" style:family="text">
      <style:text-properties style:text-line-through-style="solid" fo:letter-spacing="0.0000in"/>
    </style:style>
    <style:style style:name="T8" style:family="text">
      <style:text-properties fo:font-weight="bold" fo:font-weight-asian="bold" fo:font-weight-complex="bold" style:text-line-through-style="solid" fo:letter-spacing="0.0000in" fo:color="#c00000"/>
    </style:style>
    <style:style style:name="T9" style:family="text">
      <style:text-properties style:text-line-through-style="solid" fo:letter-spacing="0.0000in" fo:color="#c00000"/>
    </style:style>
    <style:style style:name="T10" style:family="text">
      <style:text-properties fo:font-weight="bold" fo:font-weight-asian="bold" fo:font-weight-complex="bold" style:text-line-through-style="solid" fo:letter-spacing="0.0000in"/>
    </style:style>
    <style:style style:name="T11" style:family="text">
      <style:text-properties fo:font-weight="bold" fo:font-weight-asian="bold" fo:font-weight-complex="bold" style:text-line-through-style="solid" fo:letter-spacing="0.0000in" fo:color="#002060"/>
    </style:style>
    <style:style style:name="T12" style:family="text">
      <style:text-properties fo:font-weight="bold" fo:font-weight-asian="bold" fo:font-weight-complex="bold" style:text-underline-style="solid" style:text-line-through-style="solid" fo:letter-spacing="0.0000in" fo:color="#00206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<text:s/></text:span><text:span text:style-name="T2">G</text:span><text:span text:style-name="T3">iT / </text:span><text:span text:style-name="T2">G</text:span><text:span text:style-name="T3">iTHub </text:span></text:p>
      <text:p text:style-name="P2"/>
      <text:p text:style-name="P3"><text:span text:style-name="T4">GitHub</text:span></text:p>
      <text:list text:style-name="L1">
        <text:list-item>
          <text:p text:style-name="P4"><text:span text:style-name="T4">GitHub, Git adlı bir sürüm kontrol sistemini (VCS) barındıran bulut tabanlı bir hizmettir.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3"><text:span text:style-name="T4">Git</text:span></text:p>
      <text:list text:style-name="L1">
        <text:list-item>
          <text:p text:style-name="P4"><text:span text:style-name="T5"/><text:span text:style-name="T2">Git</text:span><text:span text:style-name="T4">, bireysel küçük projelerden, ekip olarak calisilan çok büyük projelere kadar her şeyi hızlı ve verimli bir şekilde yonetmek için tasarlanmış ücretsiz ve açık kaynaklı</text:span><text:span text:style-name="T6">, dağıtılmış bir sürüm kontrol sistemi</text:span><text:span text:style-name="T4">dir(distributed version control system).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3"><text:span text:style-name="T4">Git - githup</text:span></text:p>
      <text:list text:style-name="L1">
        <text:list-item>
          <text:p text:style-name="P4"><text:span text:style-name="T5"/><text:span text:style-name="T2">Git, </text:span><text:span text:style-name="T4">kaynak kod geçmişinizi yönetmenize ve takip etmenize izin veren bir version kontrol sistemidir. 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6"><text:span text:style-name="T2">GitHub </text:span><text:span text:style-name="T4">ise, Git depolarını(</text:span><text:span text:style-name="T6">repo</text:span><text:span text:style-name="T4">) yönetmenize izin veren bulut tabanlı bir barındırma(</text:span><text:span text:style-name="T6">hosting</text:span><text:span text:style-name="T4">) hizmetidir.</text:span></text:p>
      <text:p text:style-name="P7"><text:span text:style-name="T4">Kisisel kullanim</text:span></text:p>
      <text:list text:style-name="L1">
        <text:list-item>
          <text:p text:style-name="P4"><text:span text:style-name="T4">Kisisel kullanimda her bir projemiz icin GitHub’da bir repo olusturup, bunu istedigimiz araliklarla bilgisayariimiz veya GitHub’daki hali uzerinden birlestirebiliriz.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8"><text:span text:style-name="T4">Kodumuzu her birlestirdigimizde, git projenin bir yedegini alir(version).</text:span></text:p>
      <text:p text:style-name="P5"/>
      <text:p text:style-name="P5"/>
      <text:p text:style-name="P5"/>
      <text:p text:style-name="P7"><text:span text:style-name="T4">Kisisel kullanim</text:span></text:p>
      <text:list text:style-name="L1">
        <text:list-item>
          <text:p text:style-name="P4"><text:span text:style-name="T4">Kodumuzu her birlestirdigimizde, git projenin bir yedegini alir(version).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2"><text:span text:style-name="T4">Git bilgisayarimizdaki klasor yapisi uzerinden calisir. </text:span></text:p>
      <text:p text:style-name="P2"><text:span text:style-name="T4">Siz kodlarinizi yazdiginiz bir projede calissaniz bile, Git o kodlarin kayitli oldugu klasor uzerinden kontrollerini ve guncellemelerini yapar</text:span></text:p>
      <text:p text:style-name="P2"><text:span text:style-name="T4">Bir klasorun, git tarafindan kontrol edilip edilmedigini anlamak isterseniz, o klasor icerisinde “</text:span><text:span text:style-name="T6">Gizli dosyalari goster</text:span><text:span text:style-name="T4">” ayarini acarak, </text:span><text:span text:style-name="T2">.git </text:span><text:span text:style-name="T4">klasoru olup olmadigina bakabilirsiniz </text:span></text:p>
      <text:p text:style-name="P5"/>
      <text:p text:style-name="P5"/>
      <text:p text:style-name="P6"><text:span text:style-name="T4">Projemiz buyuk oldugunda her seferinde yeniden yedek almak, cok buyuk depolama alanlari gerektireceginden, </text:span><text:span text:style-name="T6">Git</text:span><text:span text:style-name="T4"><text:s/>yeni versiyonlar icin </text:span><text:span text:style-name="T6">sadece degisiklikleri</text:span><text:span text:style-name="T4"><text:s/>kaydeder.</text:span></text:p>
      <text:p text:style-name="P3"><text:span text:style-name="T4">Git komutlari</text:span></text:p>
      <text:list text:style-name="L1">
        <text:list-item>
          <text:p text:style-name="P4"><text:span text:style-name="T4">Git bilgisayarlarimizdaki windows benzeri uygulamalarla degil, bilgisayarlarin ilk kullanilmaya basladigi donemdeki gibi, </text:span><text:span text:style-name="T6">siyah ekrana yazilan komutlarla</text:span><text:span text:style-name="T4"><text:s/>calisir.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2"><text:span text:style-name="T4">Git komutlarini CMD(Command Prompt) ile veya kullandigimiz programlarin terminal yapilariyla kullanabilirsiniz. <text:s/></text:span></text:p>
      <text:p text:style-name="P2"><text:span text:style-name="T4">Gunumuzde GitHub Desktop gibi uygulamalar Command Prompt ihtiyaci olmadan da calismaniza izin verse de version kontrolu icin </text:span><text:span text:style-name="T2">temel</text:span><text:span text:style-name="T4"><text:s/></text:span><text:span text:style-name="T6">git komutlarini kullanmayi </text:span><text:span text:style-name="T4">bilmelisiniz.</text:span></text:p>
      <text:p text:style-name="P2"><text:span text:style-name="T4">Git komutlarini </text:span><text:span text:style-name="T6">ezberlemek zorunda degilsiniz. </text:span><text:span text:style-name="T4">Google ile basit bir arama yaptiginizda tum komutlar ve ne ise yaradiklari karsiniza cikacaktir.</text:span></text:p>
      <text:p text:style-name="P5"/>
      <text:p text:style-name="P7"><text:span text:style-name="T7">Kisisel kullanim</text:span></text:p>
      <text:list text:style-name="L1">
        <text:list-item>
          <text:p text:style-name="P9"><text:span text:style-name="T5"/><text:span text:style-name="T8">1. </text:span><text:span text:style-name="T7">Bilgisayarimizdaki bir dosyayi ilk defa Git’e tanitip, Github’da olusturacagimiz bir repo’ya yukleme</text:span></text:p>
        </text:list-item>
      </text:list>
      <text:list text:style-name="L1">
        <text:list-item>
          <text:p text:style-name="P4"><text:span text:style-name="T7">Ahmet Bulutluoz <text:s text:c="3"/>Mayis 2022</text:span></text:p>
        </text:list-item>
      </text:list>
      <text:p text:style-name="P5"/>
      <text:p text:style-name="P2"><text:span text:style-name="T7">1. Bilgisayarimizdaki bir dosyayi ilk defa Git’e tanitip, Github’da olusturacagimiz bir repo’ya yukleme</text:span></text:p>
      <text:p text:style-name="P2"><text:span text:style-name="T7">Kisisel kullanimda yapacagimiz tum islemler, kendi bilgisayarimizdaki </text:span><text:span text:style-name="T9">local repository </text:span><text:span text:style-name="T7">ile GitHub’daki </text:span><text:span text:style-name="T9">Remote Repository</text:span><text:span text:style-name="T7"><text:s/>arasinda </text:span><text:span text:style-name="T8">senkronizasyondan</text:span><text:span text:style-name="T7"><text:s/>ibarettir.</text:span></text:p>
      <text:p text:style-name="P2"><text:span text:style-name="T7">A. Local’de repo olusturma </text:span><text:span text:style-name="T8">git init</text:span></text:p>
      <text:p text:style-name="P2"><text:span text:style-name="T7">B. Klasorumuzdeki tum dosyalari local’deki repoya yukleme </text:span><text:span text:style-name="T8">git add .</text:span></text:p>
      <text:p text:style-name="P2"><text:span text:style-name="T7">C. Local repoda version olusturma </text:span><text:span text:style-name="T8">git commit –m “isim”</text:span></text:p>
      <text:p text:style-name="P2"><text:span text:style-name="T7">D. Remote repo’yu Github’da olusturun</text:span></text:p>
      <text:p text:style-name="P2"><text:span text:style-name="T7">F. Remote repo ile local repoyu baglama </text:span></text:p>
      <text:p text:style-name="P10"><text:span text:style-name="T10"><text:s text:c="4"/>git remote add origin “https://github.com/</text:span><text:span text:style-name="T11">repoPath</text:span><text:span text:style-name="T10">”</text:span></text:p>
      <text:p text:style-name="P2"><text:span text:style-name="T7">G. Remote repo’yu ile local repoyu senkronize etme </text:span></text:p>
      <text:p text:style-name="P10"><text:span text:style-name="T10"><text:s text:c="4"/>git push –u origin main</text:span></text:p>
      <text:p text:style-name="P2"><text:span text:style-name="T7">E. Remote repo’daki branch’i tanimlayin : </text:span><text:span text:style-name="T8">git branch -M main</text:span></text:p>
      <text:p text:style-name="P7"><text:span text:style-name="T4">Kisisel kullanim</text:span></text:p>
      <text:list text:style-name="L1">
        <text:list-item>
          <text:p text:style-name="P9"><text:span text:style-name="T5"/><text:span text:style-name="T2">2. </text:span><text:span text:style-name="T4">Bilgisayarimizdaki local repo’da yaptigimiz degisiklikleri <text:s/>Github’daki repo ile senkronizasyon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2"><text:span text:style-name="T4">2. Bilgisayarimizdaki local repo’da yaptigimiz degisiklikleri <text:s/>Github’daki repo ile senkronizasyon</text:span></text:p>
      <text:p text:style-name="P2"><text:span text:style-name="T4">A. Klasorumuzdeki tum dosyalari local’deki repoya yukleme </text:span><text:span text:style-name="T2">git add .</text:span></text:p>
      <text:p text:style-name="P2"><text:span text:style-name="T4">B. Local repoda version olusturma </text:span><text:span text:style-name="T2">git commit –m “isim”</text:span></text:p>
      <text:p text:style-name="P2"><text:span text:style-name="T4">C. Remote repo’yu ile local repoyu senkronize etme </text:span></text:p>
      <text:p text:style-name="P10"><text:span text:style-name="T3"><text:s text:c="4"/>git push</text:span></text:p>
      <text:p text:style-name="P7"><text:span text:style-name="T4">Kisisel kullanim</text:span></text:p>
      <text:list text:style-name="L1">
        <text:list-item>
          <text:p text:style-name="P9"><text:span text:style-name="T5"/><text:span text:style-name="T2">3. </text:span><text:span text:style-name="T4">Github’da begendigimiz ve erisim yetkimiz olan bir repo’yu bilgisayarimiza indirme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2"><text:span text:style-name="T4">3. Github’da begendigimiz ve erisim yetkimiz olan bir repo’yu bilgisayarimiza indirme</text:span></text:p>
      <text:p text:style-name="P2"><text:span text:style-name="T4">A. Istedigimiz repo’yu bilgisayarimiza indirecegimiz ve senkronizasyon yapacagimiz bir klasor/proje olusturalim</text:span></text:p>
      <text:p text:style-name="P2"><text:span text:style-name="T4">B. Klasor/proje icin komut ekranini acalim</text:span></text:p>
      <text:p text:style-name="P2"><text:span text:style-name="T4">D. Remote repo’nun linkini kopyalayalim</text:span></text:p>
      <text:p text:style-name="P2"><text:span text:style-name="T4">C. Klasor/proje’yi git’e tanitalim </text:span><text:span text:style-name="T2">git init</text:span></text:p>
      <text:p text:style-name="P2"><text:span text:style-name="T4">E. Remote repo’yu bilgisayarimizdaki klasor/proje’ye indirelim </text:span></text:p>
      <text:p text:style-name="P11"><text:span text:style-name="T2">git pull </text:span><text:span text:style-name="T3">githup repo linki</text:span></text:p>
      <text:p text:style-name="P2"><text:span text:style-name="T2">Sonraki indirmelerde : </text:span><text:span text:style-name="T4">D. ve E. maddelerini yapmamiz yeterli olacaktir.</text:span></text:p>
      <text:p text:style-name="P7"><text:span text:style-name="T4">Kisisel kullanim</text:span></text:p>
      <text:list text:style-name="L1">
        <text:list-item>
          <text:p text:style-name="P9"><text:span text:style-name="T5"/><text:span text:style-name="T2">4. </text:span><text:span text:style-name="T4">Github’daki repo’muzu farkli bir klasore indirip, o klasor uzerinden senkronizasyon</text:span></text:p>
        </text:list-item>
      </text:list>
      <text:list text:style-name="L1">
        <text:list-item>
          <text:p text:style-name="P4"><text:span text:style-name="T4">Ahmet Bulutluoz <text:s text:c="3"/>Mayis 2022</text:span></text:p>
        </text:list-item>
      </text:list>
      <text:p text:style-name="P5"/>
      <text:p text:style-name="P2"><text:span text:style-name="T4">4. Github’daki repo’muzu farkli bir klasore indirip, o klasor uzerinden senkronizasyon</text:span></text:p>
      <text:p text:style-name="P2"><text:span text:style-name="T4">A. Istedigimiz repo’yu bilgisayarimiza indirecegimiz ve senkronizasyon yapacagimiz bir klasor/proje olusturalim</text:span></text:p>
      <text:p text:style-name="P2"><text:span text:style-name="T4">B. Klasor/proje icin komut ekranini acalim</text:span></text:p>
      <text:p text:style-name="P2"><text:span text:style-name="T4">D. Remote repo’nun linkini kopyalayalim</text:span></text:p>
      <text:p text:style-name="P2"><text:span text:style-name="T4">C. Klasor/proje’yi git’e tanitalim </text:span><text:span text:style-name="T2">git init</text:span></text:p>
      <text:p text:style-name="P2"><text:span text:style-name="T4">E. Remote repo’yu bilgisayarimizdaki klasor/proje’ye indirelim </text:span></text:p>
      <text:p text:style-name="P11"><text:span text:style-name="T2">git pull </text:span><text:span text:style-name="T3">githup repo linki</text:span></text:p>
      <text:p text:style-name="P2"><text:span text:style-name="T4">G. Remote repo ile local repoyu baglama </text:span></text:p>
      <text:p text:style-name="P10"><text:span text:style-name="T3"><text:s text:c="4"/>git remote add origin “https://github.com/</text:span><text:span text:style-name="T12">repoPath</text:span><text:span text:style-name="T3">”</text:span></text:p>
      <text:p text:style-name="P2"><text:span text:style-name="T4">H. Remote repo’yu ile local repoyu senkronize etme </text:span></text:p>
      <text:p text:style-name="P10"><text:span text:style-name="T3"><text:s text:c="4"/>git push –u origin main</text:span></text:p>
      <text:p text:style-name="P2"><text:span text:style-name="T4">F. Remote repo’daki branch’i tanimlayin : </text:span><text:span text:style-name="T2">git branch -M 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  <dc:title>PANTONE® COLOR OF THE YEAR 2022</dc:title>
    <meta:initial-creator>2</meta:initial-creator>
  </office:meta>
</office:document-meta>
</file>